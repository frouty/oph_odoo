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margin-top="0.3cm" fo:margin-bottom="0.101cm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h text:style-name="P7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ext:p text:style-name="P2">datewotime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49:39.555260490</dc:date>
    <meta:editing-duration>PT11H35M48S</meta:editing-duration>
    <meta:editing-cycles>172</meta:editing-cycles>
    <dc:creator>Laurent FRANCOIS</dc:creator>
    <meta:document-statistic meta:table-count="2" meta:image-count="0" meta:object-count="0" meta:page-count="1" meta:paragraph-count="62" meta:word-count="374" meta:character-count="2206" meta:non-whitespace-character-count="1970"/>
  </office:meta>
</office:document-meta>
</file>