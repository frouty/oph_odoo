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165.01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f6a4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09091"/>
    </style:style>
    <style:style style:name="P7" style:family="paragraph" style:parent-style-name="Table_20_Contents">
      <style:text-properties officeooo:paragraph-rsid="00109091"/>
    </style:style>
    <style:style style:name="P8" style:family="paragraph" style:parent-style-name="Table_20_Contents">
      <style:text-properties officeooo:rsid="0015d206" officeooo:paragraph-rsid="00109091"/>
    </style:style>
    <style:style style:name="P9" style:family="paragraph" style:parent-style-name="Table_20_Contents">
      <style:text-properties officeooo:rsid="001645ec" officeooo:paragraph-rsid="00109091"/>
    </style:style>
    <style:style style:name="P10" style:family="paragraph" style:parent-style-name="Table_20_Contents">
      <style:text-properties officeooo:rsid="001401e4" officeooo:paragraph-rsid="001401e4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5" style:family="text">
      <style:text-properties officeooo:rsid="00202fa2"/>
    </style:style>
    <style:style style:name="T6" style:family="text">
      <style:text-properties style:font-name="DejaVu Sans" fo:font-weight="bold" officeooo:rsid="00202fa2" style:font-size-asian="10.5pt" style:font-weight-asian="bold" style:font-weight-complex="bold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_DdeLink__2514_14187942391"/><text:span text:style-name="Source_20_Text"><text:span text:style-name="T2"/></text:span></text:p>
      <text:p text:style-name="P11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5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633872093456">
          <table:table-cell table:style-name="Table1.A1" office:value-type="string">
            <text:p text:style-name="P8"><text:span text:style-name="Strong_20_Emphasis"><text:span text:style-name="T6">TAG</text:span></text:span><text:span text:style-name="Strong_20_Emphasis"> SARS COV2 </text:span></text:p>
          </table:table-cell>
        </table:table-row>
        <table:table-row table:style-name="TableLine94633869545824">
          <table:table-cell table:style-name="Table1.A1" office:value-type="string">
            <text:p text:style-name="P9">Prélévement naso-pharyngé.</text:p>
          </table:table-cell>
        </table:table-row>
        <table:table-row table:style-name="TableLine94633870955824">
          <table:table-cell table:style-name="Table1.A1" office:value-type="string">
            <text:p text:style-name="P8"/>
          </table:table-cell>
        </table:table-row>
        <table:table-row table:style-name="TableLine94633869545456">
          <table:table-cell table:style-name="Table1.A1" office:value-type="string">
            <text:p text:style-name="P9">Bilan pré opératoire Clinique Kuendu Magnin</text:p>
            <text:p text:style-name="P10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6"><text:span text:style-name="Source_20_Text"/></text:p>
      <text:p text:style-name="Signature"><draw:frame draw:style-name="fr2" draw:name="graphics2" text:anchor-type="paragraph" svg:x="99.85mm" svg:y="9.35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5T06:42:04.355873143</dc:date>
    <meta:editing-duration>PT5H49M47S</meta:editing-duration>
    <meta:editing-cycles>88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8" meta:word-count="62" meta:character-count="424" meta:non-whitespace-character-count="392"/>
  </office:meta>
</office:document-meta>
</file>