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74BF69448A91026.png" manifest:media-type="image/png"/>
  <manifest:file-entry manifest:full-path="Pictures/100000000000066A000009155A617223DA84576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42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447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7" text:anchor-type="page" text:anchor-page-number="1" svg:x="1.8965in" svg:y="8.3811in" svg:width="3.9465in" draw:z-index="1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2" draw:name="Frame6" text:anchor-type="page" text:anchor-page-number="1" svg:x="0.2811in" svg:y="9.8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3859100653168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graphics1" text:anchor-type="page" text:anchor-page-number="1" svg:x="0in" svg:y="0in" svg:width="8.2681in" svg:height="11.6898in" draw:z-index="0">
        <draw:image xlink:href="Pictures/100000000000066A000009155A617223DA845761.jpg" xlink:type="simple" xlink:show="embed" xlink:actuate="onLoad" draw:mime-type="image/jpeg"/>
      </draw:frame>
      <text:p text:style-name="Standard"><draw:frame draw:style-name="fr3" draw:name="Image1" text:anchor-type="paragraph" svg:x="0.7874in" svg:y="6.5417in" svg:width="2.2346in" svg:height="0.7138in" draw:z-index="3"><draw:image xlink:href="Pictures/100002010000010A00000055C74BF69448A9102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6T21:02:58</meta:creation-date>
    <dc:date>2021-06-22T02:13:48.973032887</dc:date>
    <meta:editing-duration>PT4H24M20S</meta:editing-duration>
    <meta:editing-cycles>101</meta:editing-cycles>
    <meta:generator>LibreOffice/7.1.3.2$Linux_X86_64 LibreOffice_project/10$Build-2</meta:generator>
    <meta:printed-by>L. FRANCOIS</meta:printed-by>
    <meta:print-date>2015-02-18T08:53:32</meta:print-date>
    <meta:document-statistic meta:table-count="1" meta:image-count="2" meta:object-count="0" meta:page-count="1" meta:paragraph-count="9" meta:word-count="28" meta:character-count="214" meta:non-whitespace-character-count="209"/>
  </office:meta>
</office:document-meta>
</file>